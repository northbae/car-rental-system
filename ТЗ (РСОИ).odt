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right="2.501cm"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officeooo:paragraph-rsid="0007d522"/>
    </style:style>
    <style:style style:name="P6" style:family="paragraph" style:parent-style-name="Standard">
      <style:paragraph-properties fo:text-align="end" style:justify-single-word="false"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/>
    </style:style>
    <style:style style:name="P9" style:family="paragraph" style:parent-style-name="Standard">
      <style:paragraph-properties fo:margin-top="0cm" fo:margin-bottom="0.282cm" style:contextual-spacing="false" fo:line-height="150%" fo:text-align="justify" style:justify-single-word="false" fo:padding="0cm" fo:border="none" style:shadow="none" style:join-border="false"/>
      <style:text-properties fo:color="#000000" loext:opacity="100%" fo:font-size="14pt" fo:font-weight="bold" style:font-size-asian="14pt" style:font-weight-asian="bold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1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3pt solid #000000"/>
    </style:style>
    <style:style style:name="P13" style:family="paragraph" style:parent-style-name="Standard">
      <style:paragraph-properties fo:margin-left="13.757cm" fo:margin-right="-0.004cm" fo:text-align="center" style:justify-single-word="false" fo:text-indent="1.249cm" style:auto-text-indent="false"/>
    </style:style>
    <style:style style:name="P14" style:family="paragraph" style:parent-style-name="Standard">
      <style:paragraph-properties fo:margin-right="0.997cm"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left="13.757cm" fo:margin-right="-0.004cm"/>
    </style:style>
    <style:style style:name="P17" style:family="paragraph" style:parent-style-name="Standard">
      <style:text-properties fo:font-size="7pt" style:font-size-asian="7pt" style:font-size-complex="7pt"/>
    </style:style>
    <style:style style:name="P18" style:family="paragraph" style:parent-style-name="Standard">
      <style:text-properties fo:font-size="7pt" style:text-underline-style="solid" style:text-underline-width="auto" style:text-underline-color="font-color" style:font-size-asian="7pt" style:font-size-complex="7pt"/>
    </style:style>
    <style:style style:name="P19" style:family="paragraph" style:parent-style-name="Standard">
      <style:text-properties fo:font-size="9pt" style:font-size-asian="9pt" style:font-size-complex="9pt"/>
    </style:style>
    <style:style style:name="P20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21" style:family="paragraph" style:parent-style-name="Standard">
      <style:paragraph-properties fo:text-align="justify" style:justify-single-word="false"/>
      <style:text-properties fo:font-size="6pt" style:font-size-asian="6pt" style:font-size-complex="6pt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margin-right="0.762cm" fo:text-align="justify" style:justify-single-word="false" fo:orphans="0" fo:widows="0">
        <style:tab-stops>
          <style:tab-stop style:position="18.165cm"/>
        </style:tab-stops>
      </style:paragraph-properties>
    </style:style>
    <style:style style:name="P24" style:family="paragraph" style:parent-style-name="Standard">
      <style:paragraph-properties fo:margin-right="0.944cm" fo:line-height="100%" fo:text-align="justify" style:justify-single-word="false">
        <style:tab-stops>
          <style:tab-stop style:position="18.249cm"/>
        </style:tab-stops>
      </style:paragraph-properties>
      <style:text-properties officeooo:paragraph-rsid="00098267"/>
    </style:style>
    <style:style style:name="P25" style:family="paragraph" style:parent-style-name="Standard">
      <style:paragraph-properties fo:margin-right="0.944cm" fo:line-height="100%" fo:text-align="justify" style:justify-single-word="false">
        <style:tab-stops>
          <style:tab-stop style:position="18.249cm"/>
        </style:tab-stops>
      </style:paragraph-properties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margin-right="0.762cm" fo:text-align="justify" style:justify-single-word="false" fo:orphans="0" fo:widows="0">
        <style:tab-stops>
          <style:tab-stop style:position="18.165cm"/>
        </style:tab-stops>
      </style:paragraph-properties>
      <style:text-properties style:text-underline-style="solid" style:text-underline-width="auto" style:text-underline-color="font-color"/>
    </style:style>
    <style:style style:name="P27" style:family="paragraph" style:parent-style-name="Standard">
      <style:paragraph-properties fo:text-align="justify" style:justify-single-word="false"/>
      <style:text-properties fo:font-size="4pt" fo:font-style="italic" fo:font-weight="bold" style:font-size-asian="4pt" style:font-style-asian="italic" style:font-weight-asian="bold" style:font-size-complex="4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4pt" fo:font-weight="bold" style:font-size-asian="14pt" style:font-weight-asian="bold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text-underline-style="solid" style:text-underline-width="auto" style:text-underline-color="font-color" fo:font-weight="bold" officeooo:rsid="0007d522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05e837"/>
    </style:style>
    <style:style style:name="T9" style:family="text">
      <style:text-properties style:text-underline-style="solid" style:text-underline-width="auto" style:text-underline-color="font-color" officeooo:rsid="0007d522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3" style:family="text">
      <style:text-properties fo:font-size="18pt" fo:font-weight="bold" style:font-size-asian="18pt" style:font-weight-asian="bold" style:font-size-complex="18pt"/>
    </style:style>
    <style:style style:name="T14" style:family="text">
      <style:text-properties fo:font-size="16pt" fo:font-weight="bold" style:font-size-asian="16pt" style:font-weight-asian="bold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language="en" fo:country="US" officeooo:rsid="0005e837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font-size="4pt" fo:font-style="italic" fo:font-weight="bold" style:font-size-asian="4pt" style:font-style-asian="italic" style:font-weight-asian="bold" style:font-size-complex="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><text:span text:style-name="T3">Министерство науки и высшего образования Российской Федерации</text:span><text:span text:style-name="T3"/></text:p>
      <text:p text:style-name="P3" loext:marker-style-name="T3"><text:span text:style-name="T3">Федеральное государственное автономное образовательное учреждение </text:span></text:p>
      <text:p text:style-name="P3" loext:marker-style-name="T3"><text:span text:style-name="T3">высшего образования</text:span><text:span text:style-name="T3"/></text:p>
      <text:p text:style-name="P3" loext:marker-style-name="T3"><text:span text:style-name="T3">«Московский государственный технический университет имени Н.Э. Баумана</text:span><text:span text:style-name="T3"/></text:p>
      <text:p text:style-name="P3" loext:marker-style-name="T3"><text:span text:style-name="T3">(национальный исследовательский университет)»</text:span><text:span text:style-name="T3"/></text:p>
      <text:p text:style-name="P12" loext:marker-style-name="T3"><text:span text:style-name="T3">(МГТУ им. Н.Э. Баумана)</text:span><text:span text:style-name="T3"/></text:p>
      <text:p text:style-name="P15" loext:marker-style-name="T3"/>
      <text:p text:style-name="P1">УТВЕРЖДАЮ</text:p>
      <text:p text:style-name="P2">Заведующий кафедрой <text:span text:style-name="T4"><text:s text:c="8"/>ИУ7 <text:s text:c="7"/></text:span><text:tab/></text:p>
      <text:p text:style-name="P13" loext:marker-style-name="T10"><text:span text:style-name="T10">(Индекс)</text:span><text:span text:style-name="T10"/></text:p>
      <text:p text:style-name="P2" loext:marker-style-name="T4">______________ <text:s/><text:span text:style-name="T4"><text:s text:c="5"/>И. В. Рудаков <text:s text:c="4"/><text:tab/> <text:s text:c="3"/></text:span><text:span text:style-name="T4"/></text:p>
      <text:p text:style-name="P16" loext:marker-style-name="T10"><text:span text:style-name="T10"><text:s text:c="3"/>(И.О.Фамилия)</text:span><text:span text:style-name="T10"/></text:p>
      <text:p text:style-name="P2">« _____ » ____________ 20 ____ г.</text:p>
      <text:p text:style-name="P17" loext:marker-style-name="T11"/>
      <text:p text:style-name="P3" loext:marker-style-name="T13"><text:span text:style-name="T13">ЗАДАНИЕ</text:span><text:span text:style-name="T13"/></text:p>
      <text:p text:style-name="P3" loext:marker-style-name="T14"><text:span text:style-name="T14">на выполнение курсовой работы</text:span></text:p>
      <text:p text:style-name="P17" loext:marker-style-name="T11"/>
      <text:p text:style-name="Standard">по дисциплине <text:span text:style-name="T4"><text:tab/><text:tab/><text:tab/>Распределенные системы обработки информации<text:tab/><text:tab/><text:tab/><text:tab/></text:span></text:p>
      <text:p text:style-name="P19" loext:marker-style-name="T15"/>
      <text:p text:style-name="Standard">Студент группы <text:span text:style-name="T4"><text:tab/>ИУ7-2</text:span><text:span text:style-name="T8">2</text:span><text:span text:style-name="T4">М<text:tab/></text:span></text:p>
      <text:p text:style-name="P18" loext:marker-style-name="T12"/>
      <text:p text:style-name="Standard" loext:marker-style-name="T4"><text:span text:style-name="T4"><text:s text:c="56"/><text:tab/>Критинина Елена Константиновна<text:tab/><text:tab/><text:tab/><text:tab/><text:tab/></text:span></text:p>
      <text:p text:style-name="P3">(Фамилия, имя, отчество)</text:p>
      <text:p text:style-name="P21" loext:marker-style-name="T16"/>
      <text:p text:style-name="P4"><text:bookmark text:name="_gjdgxs"/>Тема курсового проекта <text:span text:style-name="T4"><text:tab/>Разработка </text:span><text:span text:style-name="T9">системы аренды автомобилей на основе микросервисной архитектуры</text:span><text:span text:style-name="T4"><text:tab/></text:span></text:p>
      <text:p text:style-name="P21" loext:marker-style-name="T16"/>
      <text:p text:style-name="P4" loext:marker-style-name="T4">Направленность КП (учебный, исследовательский, практический, производственный, др.)<text:span text:style-name="T4"/></text:p>
      <text:p text:style-name="P4"><text:span text:style-name="T4"><text:s/><text:tab/><text:tab/><text:tab/><text:tab/> <text:tab/> <text:s text:c="2"/>учебный<text:tab/><text:tab/><text:tab/><text:tab/><text:tab/><text:tab/></text:span><text:tab/></text:p>
      <text:p text:style-name="P4">Источник тематики (кафедра, предприятие, НИР) <text:span text:style-name="T4"><text:s/><text:tab/><text:tab/><text:tab/>кафедра<text:tab/><text:tab/><text:tab/></text:span></text:p>
      <text:p text:style-name="P20" loext:marker-style-name="T15"/>
      <text:p text:style-name="P5">График выполнения проекта: <text:s/>25% к <text:span text:style-name="T4"><text:s/>4 </text:span><text:s/>нед., 50% к <text:span text:style-name="T4"><text:s/>7 </text:span><text:s/>нед., 75% к <text:span text:style-name="T4">11</text:span> нед., 100% к <text:span text:style-name="T4">14</text:span> нед.</text:p>
      <text:p text:style-name="P4" loext:marker-style-name="T15"><text:span text:style-name="T9"/></text:p>
      <text:p text:style-name="P24" loext:marker-style-name="T4"><text:span text:style-name="T6">Задание</text:span><text:span text:style-name="T9"> Разработать прототип системы аренды автомобилей на базе веб-интерфейса. Система должна состоять из микросервисов, каждый из которых отвечает за свою задачу: gateway-сервис; сервис авторизации и пользователей; сервис сбора статистики; сервис управления автомобилями; сервис аналитики; сервис аренды. Взаимодействие пользователя с системой осуществляется через клиентское приложение. Каждый сервис может иметь доступ к связанной с ним базе данных, но не должен иметь доступа к базам данных других сервисов. Все запросы между сервисами требуют авторизацию. Запросы пользователей делятся на две категории: запросы, требующие авторизации пользователя, и запросы, доступные для всех пользователей, даже неавторизованных. Для межсервисного взаимодействия использовать: HTTP, и архитектурный стиль взаимодействия RESTful. Для реализации авторизации использовать OpenID Connect. Все ошибки должны обрабатываться. Для повышения отказоустоичивости на gateway-сервисе должен быть реализован паттерн Circuit Breaker. В случае недоступности некритичного функционала должна осуществляться деградация функциональности. Все действия на сервисах должны логгироваться. Сбор статистики на сервисе сбора статистики реализовать с помощью Kafka. Для микросервисов развернуть Manage Kubernetes Cluster. Все сервисы должны собираться и разворачиваться через CI/CD c помощью Github Actions.</text:span></text:p>
      <text:p text:style-name="P25" loext:marker-style-name="T4"/>
      <text:p text:style-name="Standard"/>
      <text:p text:style-name="P4" loext:marker-style-name="T18"><text:span text:style-name="T18">Оформление курсового проекта:</text:span><text:span text:style-name="T18"/></text:p>
      <text:p text:style-name="P27" loext:marker-style-name="T19"/>
      <text:p text:style-name="P4">Расчетно-пояснительная записка на 20-30 листах формата А4.</text:p>
      <text:p text:style-name="P23" loext:marker-style-name="T4"><text:span text:style-name="T4">Расчетно-пояснительная записка должна содержать постановку задачи, введение, аналитическую, конструкторскую, технологическую части, заключение и список литературы.</text:span><text:span text:style-name="T4"/></text:p>
      <text:p text:style-name="P26" loext:marker-style-name="T4"/>
      <text:p text:style-name="P26" loext:marker-style-name="T4"/>
      <text:p text:style-name="P26" loext:marker-style-name="T4"/>
      <text:p text:style-name="P4">Дата выдачи задания «___» <text:span text:style-name="T4"><text:tab/><text:tab/></text:span> 202<text:span text:style-name="T17">6</text:span> г.</text:p>
      <text:p text:style-name="P4"/>
      <text:p text:style-name="Standard"><text:span text:style-name="T3">Руководитель курсового проекта<text:tab/><text:tab/></text:span><text:tab/><text:span text:style-name="T4"><text:tab/><text:tab/><text:tab/></text:span> <text:s/><text:span text:style-name="T4"><text:s text:c="6"/>А.А.Ступников<text:tab/></text:span> </text:p>
      <text:p text:style-name="P14" loext:marker-style-name="T15"><text:span text:style-name="T15"><text:s text:c="119"/>(Подпись, дата) <text:s text:c="20"/>(И.О.Фамилия) <text:s text:c="11"/></text:span><text:span text:style-name="T15"/></text:p>
      <text:p text:style-name="Standard" loext:marker-style-name="T3"><text:span text:style-name="T3">Студент<text:tab/><text:tab/><text:tab/><text:tab/><text:tab/><text:tab/></text:span><text:span text:style-name="T4"><text:tab/><text:tab/><text:tab/></text:span><text:span text:style-name="T3"> <text:s/></text:span><text:span text:style-name="T5"><text:s text:c="5"/></text:span><text:span text:style-name="T7"><text:s/>Е.К.Критинина</text:span><text:span text:style-name="T5"><text:tab/></text:span><text:span text:style-name="T3"> </text:span></text:p>
      <text:p text:style-name="P14" loext:marker-style-name="T15"><text:span text:style-name="T15"><text:s text:c="120"/>(Подпись, дата) <text:s text:c="20"/>(И.О.Фамилия) <text:s text:c="11"/></text:span><text:span text:style-name="T15"/></text:p>
      <text:p text:style-name="P9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text-align="center" style:justify-single-word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5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863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Standard">
      <style:paragraph-properties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2</text:page-number></text:span></text:p>
        <text:p text:style-name="MP2" loext:marker-style-name="MT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севолод Иванов</meta:initial-creator>
    <meta:editing-cycles>8</meta:editing-cycles>
    <meta:print-date>2023-04-13T21:45:00</meta:print-date>
    <meta:creation-date>2024-03-15T19:04:00</meta:creation-date>
    <dc:date>2026-05-30T02:28:33.680043317</dc:date>
    <meta:editing-duration>PT38M6S</meta:editing-duration>
    <meta:generator>LibreOffice/24.2.7.2$Linux_X86_64 LibreOffice_project/420$Build-2</meta:generator>
    <meta:document-statistic meta:table-count="0" meta:image-count="0" meta:object-count="0" meta:page-count="1" meta:paragraph-count="33" meta:word-count="316" meta:character-count="3147" meta:non-whitespace-character-count="2386"/>
    <meta:user-defined meta:name="AppVersion">16.0000</meta:user-defined>
    <meta:template xlink:type="simple" xlink:actuate="onRequest" xlink:title="Normal.dotm" xlink:href=""/>
  </office:meta>
</office:document-meta>
</file>